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B1000003B3AEBF4514.png" manifest:media-type="image/png"/>
  <manifest:file-entry manifest:full-path="Pictures/10000001000003AE000003AC70E77274.png" manifest:media-type="image/png"/>
  <manifest:file-entry manifest:full-path="Pictures/10000001000003AF000003B17AA99492.png" manifest:media-type="image/png"/>
  <manifest:file-entry manifest:full-path="Pictures/10000001000003AE000003AFD4B5D19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align="center" style:justify-single-word="false" fo:orphans="2" fo:widows="2" fo:text-indent="0cm" style:auto-text-indent="false"/>
      <style:text-properties officeooo:paragraph-rsid="000cafa8"/>
    </style:style>
    <style:style style:name="P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bold" officeooo:paragraph-rsid="000cafa8" fo:background-color="#ffff00" style:font-weight-asian="bold" style:font-weight-complex="bold"/>
    </style:style>
    <style:style style:name="P3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italic" fo:font-weight="bold" officeooo:paragraph-rsid="000cafa8" fo:background-color="transparent" style:font-style-asian="italic" style:font-weight-asian="bold" style:font-style-complex="italic" style:font-weight-complex="bold"/>
    </style:style>
    <style:style style:name="P4" style:family="paragraph" style:parent-style-name="Heading_20_3">
      <style:paragraph-properties fo:margin-top="0cm" fo:margin-bottom="0.247cm" style:contextual-spacing="false" fo:line-height="115%"/>
      <style:text-properties fo:color="#000000" loext:opacity="100%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5" style:family="paragraph" style:parent-style-name="Text_20_body">
      <style:text-properties fo:color="#000000" loext:opacity="100%" fo:font-weight="normal" fo:background-color="transparent" style:font-weight-asian="normal" style:font-weight-complex="normal"/>
    </style:style>
    <style:style style:name="P6" style:family="paragraph" style:parent-style-name="Heading_20_3">
      <style:paragraph-properties fo:margin-top="0cm" fo:margin-bottom="0.247cm" style:contextual-spacing="false" fo:line-height="115%" fo:break-before="page"/>
      <style:text-properties fo:color="#000000" loext:opacity="100%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bold" officeooo:paragraph-rsid="000cafa8" fo:background-color="#ffff00" style:font-weight-asian="bold" style:font-weight-complex="bold"/>
    </style:style>
    <style:style style:name="T1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2" style:family="text">
      <style:text-properties officeooo:rsid="000cafa8"/>
    </style:style>
    <style:style style:name="T3" style:family="text">
      <style:text-properties officeooo:rsid="000e79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royecto Intermodular 1º SMR - CreaDigital SMR</text:span></text:h>
      <text:h text:style-name="P2" text:outline-level="2">Módulo 1709 – Itinerario Personal para la Empleabilidad I</text:h>
      <text:h text:style-name="P3" text:outline-level="2">Creación de cuenta y repositorio en GitHub</text:h>
      <text:h text:style-name="P4" text:outline-level="3">Paso 1: Creación de cuenta en GitHub</text:h>
      <text:p text:style-name="P5"><text:span text:style-name="T2">A</text:span>cced<text:span text:style-name="T2">o</text:span> a la página oficial de GitHub y cre<text:span text:style-name="T2">o</text:span> una cuenta personal introduciendo correo electrónico, nombre de usuario y contraseña segura.</text:p>
      <text:h text:style-name="P4" text:outline-level="3">Paso 2: Creación del repositorio</text:h>
      <text:p text:style-name="P5">Una vez iniciada sesión, cre<text:span text:style-name="T2">o</text:span> un nuevo repositorio con el nombre “Proyecto-Intermodular-1-SMR”, configurándolo como público y añadiendo un archivo README inicial.</text:p>
      <text:h text:style-name="P4" text:outline-level="3"><draw:frame draw:style-name="fr1" draw:name="Imagen1" text:anchor-type="char" svg:x="1.199cm" svg:y="0.383cm" svg:width="14.055cm" svg:height="14.083cm" draw:z-index="0"><draw:image xlink:href="Pictures/10000001000003B1000003B3AEBF4514.png" xlink:type="simple" xlink:show="embed" xlink:actuate="onLoad" draw:mime-type="image/png"/></draw:frame></text:h>
      <text:h text:style-name="P6" text:outline-level="3">Paso 3: Configuración del perfil profesional</text:h>
      <text:p text:style-name="P5"><text:span text:style-name="T2">Añado</text:span> un logo <text:span text:style-name="T2">con mis iniciales como foto de perfil, cambio el nombre </text:span>y complet<text:span text:style-name="T2">o</text:span> la biografía con una breve descripción profesional relacionada con el ciclo SMR.</text:p>
      <text:p text:style-name="P5"><draw:frame draw:style-name="fr1" draw:name="Imagen2" text:anchor-type="char" svg:x="0.778cm" svg:y="0.159cm" svg:width="15.113cm" svg:height="15.079cm" draw:z-index="1"><draw:image xlink:href="Pictures/10000001000003AE000003AC70E77274.png" xlink:type="simple" xlink:show="embed" xlink:actuate="onLoad" draw:mime-type="image/png"/></draw:frame></text:p>
      <text:h text:style-name="P4" text:outline-level="3"/>
      <text:h text:style-name="P4" text:outline-level="3"/>
      <text:h text:style-name="P6" text:outline-level="3">Paso 4: Edición del archivo README.md</text:h>
      <text:p text:style-name="P5"><text:span text:style-name="T2">E</text:span>dit<text:span text:style-name="T2">o</text:span> el archivo README.md principal del repositorio para incluir la presentación del proyecto y la reflexión personal.</text:p>
      <text:p text:style-name="P5"><draw:frame draw:style-name="fr2" draw:name="Imagen3" text:anchor-type="char" svg:width="17cm" svg:height="17.036cm" draw:z-index="2"><draw:image xlink:href="Pictures/10000001000003AF000003B17AA99492.png" xlink:type="simple" xlink:show="embed" xlink:actuate="onLoad" draw:mime-type="image/png"/></draw:frame></text:p>
      <text:h text:style-name="P4" text:outline-level="3"/>
      <text:h text:style-name="P6" text:outline-level="3">Paso 5: Guardado y publicación de cambios</text:h>
      <text:p text:style-name="P5"><text:span text:style-name="T3">Por ultimo</text:span> se guardan los cambios realizados en el README mediante la opción “Commit changes”, quedando el repositorio actualizado y visible públicamente.</text:p>
      <text:p text:style-name="P5"><draw:frame draw:style-name="fr1" draw:name="Imagen4" text:anchor-type="char" svg:x="0cm" svg:y="0.277cm" svg:width="17cm" svg:height="17.018cm" draw:z-index="3"><draw:image xlink:href="Pictures/10000001000003AE000003AFD4B5D198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8T09:57:23.588042000</meta:creation-date>
    <dc:date>2026-05-18T10:09:25.353965100</dc:date>
    <meta:editing-duration>PT1M21S</meta:editing-duration>
    <meta:editing-cycles>1</meta:editing-cycles>
    <meta:document-statistic meta:table-count="0" meta:image-count="4" meta:object-count="0" meta:page-count="4" meta:paragraph-count="13" meta:word-count="161" meta:character-count="1067" meta:non-whitespace-character-count="918"/>
    <meta:generator>LibreOffice/25.8.1.1$Windows_X86_64 LibreOffice_project/54047653041915e595ad4e45cccea684809c77b5</meta:generator>
  </office:meta>
</office:document-meta>
</file>